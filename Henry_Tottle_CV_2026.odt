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071cm" style:contextual-spacing="false"/>
      <style:text-properties officeooo:paragraph-rsid="000e722e"/>
    </style:style>
    <style:style style:name="P2" style:family="paragraph" style:parent-style-name="Standard">
      <style:paragraph-properties fo:margin-top="0cm" fo:margin-bottom="0.353cm" style:contextual-spacing="false"/>
    </style:style>
    <style:style style:name="P3" style:family="paragraph" style:parent-style-name="Standard">
      <style:paragraph-properties fo:margin-top="0.459cm" fo:margin-bottom="0.212cm" style:contextual-spacing="false" fo:padding-left="0cm" fo:padding-right="0cm" fo:padding-top="0cm" fo:padding-bottom="0.071cm" fo:border-left="none" fo:border-right="none" fo:border-top="none" fo:border-bottom="0.74pt solid #1f3b57"/>
    </style:style>
    <style:style style:name="P4" style:family="paragraph" style:parent-style-name="Standard">
      <style:paragraph-properties fo:margin-top="0cm" fo:margin-bottom="0.176cm" style:contextual-spacing="false"/>
      <style:text-properties officeooo:paragraph-rsid="000e722e"/>
    </style:style>
    <style:style style:name="P5" style:family="paragraph" style:parent-style-name="Standard">
      <style:paragraph-properties fo:margin-top="0cm" fo:margin-bottom="0.106cm" style:contextual-spacing="false"/>
    </style:style>
    <style:style style:name="P6" style:family="paragraph" style:parent-style-name="Standard">
      <style:paragraph-properties fo:margin-top="0.282cm" fo:margin-bottom="0.035cm" style:contextual-spacing="false"/>
    </style:style>
    <style:style style:name="P7" style:family="paragraph" style:parent-style-name="Standard">
      <style:paragraph-properties fo:margin-top="0cm" fo:margin-bottom="0.176cm" style:contextual-spacing="false"/>
    </style:style>
    <style:style style:name="P8" style:family="paragraph" style:parent-style-name="Body_20_Style" style:list-style-name="WWNum1">
      <style:paragraph-properties fo:margin-top="0cm" fo:margin-bottom="0.176cm" style:contextual-spacing="false"/>
    </style:style>
    <style:style style:name="P9" style:family="paragraph" style:parent-style-name="Body_20_Style" style:list-style-name="WWNum1">
      <style:paragraph-properties fo:margin-top="0cm" fo:margin-bottom="0.176cm" style:contextual-spacing="false"/>
      <style:text-properties officeooo:rsid="000e722e" officeooo:paragraph-rsid="000e722e"/>
    </style:style>
    <style:style style:name="P10" style:family="paragraph" style:parent-style-name="Body_20_Style">
      <style:paragraph-properties fo:margin-top="0cm" fo:margin-bottom="0.176cm" style:contextual-spacing="false"/>
    </style:style>
    <style:style style:name="P11" style:family="paragraph" style:parent-style-name="Standard">
      <style:paragraph-properties fo:margin-top="0.282cm" fo:margin-bottom="0.035cm" style:contextual-spacing="false"/>
      <style:text-properties fo:font-size="10.5pt" fo:font-weight="bold" style:font-size-asian="10.5pt" style:font-weight-asian="bold" style:font-size-complex="10.5pt" style:font-weight-complex="bold"/>
    </style:style>
    <style:style style:name="P12" style:family="paragraph" style:parent-style-name="Standard">
      <style:paragraph-properties fo:margin-top="0.282cm" fo:margin-bottom="0.035cm" style:contextual-spacing="false"/>
      <style:text-properties fo:font-size="10.5pt" fo:font-weight="bold" officeooo:paragraph-rsid="000fccfe" style:font-size-asian="10.5pt" style:font-weight-asian="bold" style:font-size-complex="10.5pt" style:font-weight-complex="bold"/>
    </style:style>
    <style:style style:name="P13" style:family="paragraph" style:parent-style-name="Standard">
      <style:paragraph-properties fo:margin-top="0cm" fo:margin-bottom="0.035cm" style:contextual-spacing="false"/>
    </style:style>
    <style:style style:name="P14" style:family="paragraph" style:parent-style-name="Standard">
      <style:paragraph-properties fo:margin-top="0.176cm" fo:margin-bottom="0.035cm" style:contextual-spacing="false"/>
    </style:style>
    <style:style style:name="T1" style:family="text">
      <style:text-properties fo:color="#1f3b57" loext:opacity="100%" fo:font-size="20pt" fo:font-weight="bold" style:font-size-asian="20pt" style:font-weight-asian="bold" style:font-size-complex="20pt" style:font-weight-complex="bold"/>
    </style:style>
    <style:style style:name="T2" style:family="text">
      <style:text-properties fo:color="#555555" loext:opacity="100%" fo:font-size="9.5pt" style:font-size-asian="9.5pt" style:font-size-complex="9.5pt"/>
    </style:style>
    <style:style style:name="T3" style:family="text">
      <style:text-properties fo:color="#800000" loext:opacity="100%" fo:font-size="9.5pt" style:font-size-asian="9.5pt" style:font-size-complex="9.5pt"/>
    </style:style>
    <style:style style:name="T4" style:family="text">
      <style:text-properties fo:color="#1f3b57" loext:opacity="100%" fo:font-size="11pt" fo:font-weight="bold" style:font-size-asian="11pt" style:font-weight-asian="bold" style:font-size-complex="11pt" style:font-weight-complex="bold"/>
    </style:style>
    <style:style style:name="T5" style:family="text">
      <style:text-properties fo:font-size="10.5pt" style:font-size-asian="10.5pt" style:font-size-complex="10.5pt"/>
    </style:style>
    <style:style style:name="T6" style:family="text">
      <style:text-properties fo:font-size="10.5pt" officeooo:rsid="000fccfe" style:font-size-asian="10.5pt" style:font-size-complex="10.5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color="#555555" loext:opacity="100%" fo:font-size="10.5pt" style:font-size-asian="10.5pt" style:font-size-complex="10.5pt"/>
    </style:style>
    <style:style style:name="T9" style:family="text">
      <style:text-properties fo:color="#555555" loext:opacity="100%" fo:font-size="9.5pt" fo:font-style="italic" style:font-size-asian="9.5pt" style:font-style-asian="italic" style:font-size-complex="9.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NRY TOTTLE</text:span></text:p>
      <text:p text:style-name="P2"><text:span text:style-name="T2">Holt, Wiltshire <text:s text:c="2"/>· <text:s text:c="2"/>07709 772422 <text:s text:c="2"/>· <text:s text:c="2"/>henrywilliamtottle@gmail.com <text:s text:c="2"/>· <text:s text:c="2"/></text:span><text:a xlink:type="simple" xlink:href="https://henry-tottle.github.io/Professional_Portfolio/" text:style-name="Internet_20_link" text:visited-style-name="Visited_20_Internet_20_Link"><text:span text:style-name="T3">Portfolio</text:span></text:a><text:span text:style-name="T2"> · </text:span><text:a xlink:type="simple" xlink:href="https://github.com/Henry-Tottle" text:style-name="Internet_20_link" text:visited-style-name="Visited_20_Internet_20_Link"><text:span text:style-name="T3">GitHub</text:span></text:a><text:span text:style-name="T2"> · </text:span><text:a xlink:type="simple" xlink:href="https://www.linkedin.com/in/henry-william-tottle/" text:style-name="Internet_20_link" text:visited-style-name="Visited_20_Internet_20_Link"><text:span text:style-name="T3">LinkedIn</text:span></text:a></text:p>
      <text:p text:style-name="P3"><text:span text:style-name="T4">PROFILE</text:span></text:p>
      <text:p text:style-name="P4"><text:span text:style-name="T5">Full stack developer specialising in Django, systems architecture, and production ownership of internal business platforms. Experienced designing and deploying tools that replace manual, paper-based workflows across warehouse and logistics operations, with end-to-end responsibility spanning backend development, deployment infrastructure, and dependency/security maintenance.</text:span><text:span text:style-name="T6"> </text:span><text:span text:style-name="T5"><text:s/>Background in sound engineering and retail operations underpins strong stakeholder communication and a pragmatic, user-focused approach to technical decisions.</text:span></text:p>
      <text:p text:style-name="P3"><text:span text:style-name="T4">TECHNICAL SKILLS</text:span></text:p>
      <text:p text:style-name="P5"><text:span text:style-name="T7">Languages &amp; Tools: </text:span><text:span text:style-name="T5">Python, JavaScript, PHP, SQL, HTML, CSS, Bash</text:span></text:p>
      <text:p text:style-name="P5"><text:span text:style-name="T7">Frameworks &amp; Libraries: </text:span><text:span text:style-name="T5">Django, React, Flask, Bootstrap, Tailwind CSS</text:span></text:p>
      <text:p text:style-name="P5"><text:span text:style-name="T7">Infrastructure &amp; Deployment: </text:span><text:span text:style-name="T5">Docker, VPS deployment, Celery/Beat, Redis/Valkey, Linux (Arch), Cloudflare</text:span></text:p>
      <text:p text:style-name="P5"><text:span text:style-name="T7">Database: </text:span><text:span text:style-name="T5">MariaDB, MySQL, PostgreSQL, SQLite</text:span></text:p>
      <text:p text:style-name="P5"><text:span text:style-name="T7">Security &amp; Dependency Management: </text:span><text:span text:style-name="T5">Snyk vulnerability remediation, dependency/version auditing, network security fundamentals (HackTheBox, internal LAN audit)</text:span></text:p>
      <text:p text:style-name="P5"><text:span text:style-name="T7">Version Control &amp; Testing: </text:span><text:span text:style-name="T5">Git, GitHub, pytest, Jest, PHPUnit</text:span></text:p>
      <text:p text:style-name="P5"><text:span text:style-name="T7">Other: </text:span><text:span text:style-name="T5">RESTful APIs, Agile/Scrum, MVC Architecture, Object-Oriented Programming, workflow automation, systems thinking, modular architecture</text:span></text:p>
      <text:p text:style-name="P3"><text:span text:style-name="T4">PROFESSIONAL EXPERIENCE</text:span></text:p>
      <text:p text:style-name="P6"><text:span text:style-name="T7">Junior Full Stack Developer</text:span><text:span text:style-name="T8"> <text:s/>| <text:s/>Glentham Life Sciences</text:span></text:p>
      <text:p text:style-name="P7"><text:span text:style-name="T9">September 2025 - Present <text:s text:c="2"/>· <text:s text:c="2"/>Corsham, Wiltshire</text:span></text:p>
      <text:list text:style-name="WWNum1">
        <text:list-item text:start-value="1">
          <text:p text:style-name="P8">Designed and implemented an Internal Stock Transfer (IST) dispatch system used on warehouse scanners, built with Django and JavaScript, delivering a measurable improvement in warehouse throughput and reducing manual handling errors.</text:p>
        </text:list-item>
        <text:list-item>
          <text:p text:style-name="P8">Architected and maintain a Celery-based Stock Sync Pipeline for automated inventory reconciliation, including centralised cache lock handling, volume/liquid unit fallback logic, and expiry-date validation to prevent invalid stock states.</text:p>
        </text:list-item>
        <text:list-item>
          <text:p text:style-name="P9">Implemented a quick order compiler, removing a manual process, reducing compilation time from up to one hour, to under 1 minute.</text:p>
        </text:list-item>
        <text:list-item>
          <text:p text:style-name="P8">Created the Orders and Logistics Activity Dashboard (OLAD) to replace the Django admin view as the primary operational interface, and continue to own its ongoing feature development and accessibility improvements, making independent architectural and data-model decisions as the platform has grown.</text:p>
        </text:list-item>
        <text:list-item>
          <text:p text:style-name="P9">Created Supplier Scoreboard Dashboard and Logistics Master Dashboard which surfaces business data to provide valuable metrics for KPIs, SLAs and more accurate estimated delivery times.</text:p>
        </text:list-item>
        <text:list-item>
          <text:p text:style-name="P8">Hold end-to-end ownership of production deployment to a VPS, including Celery worker lifecycle management, Cloudflare cache , and release coordination, with no senior technical oversight.</text:p>
        </text:list-item>
        <text:list-item>
          <text:p text:style-name="P8">Identified and remediated dependency and version vulnerabilities (Snyk) across the Django stack, including Pillow and Django version issues; conducted an internal network security audit and completed hands-on offensive security training (HackTheBox Meow).</text:p>
        </text:list-item>
      </text:list>
      <text:p text:style-name="P10"/>
      <text:p text:style-name="P6"><text:span text:style-name="T7">System and Training Lead</text:span><text:span text:style-name="T8"> <text:s/>| <text:s/>Mr B's Emporium</text:span></text:p>
      <text:p text:style-name="P7"><text:span text:style-name="T9">2017 - 2025 <text:s text:c="2"/>· <text:s text:c="2"/>Bath</text:span></text:p>
      <text:list text:continue-numbering="true" text:style-name="WWNum1">
        <text:list-item>
          <text:p text:style-name="P8">Led on internal tech solutions and onboarding of new staff.</text:p>
        </text:list-item>
        <text:list-item>
          <text:p text:style-name="P8">Created comprehensive documentation for internal systems.</text:p>
        </text:list-item>
        <text:list-item>
          <text:p text:style-name="P8">Built custom spreadsheets for event ticketing and sales analysis.</text:p>
        </text:list-item>
        <text:list-item>
          <text:p text:style-name="P8">Supported stock, e-commerce and admin operations as internal IT point of contact.</text:p>
        </text:list-item>
      </text:list>
      <text:p text:style-name="P11"/>
      <text:p text:style-name="P11"/>
      <text:p text:style-name="P12"><text:soft-page-break/><text:span text:style-name="T7">Library Support Assistant</text:span><text:span text:style-name="T8"> <text:s/>| <text:s/>University of Bristol</text:span></text:p>
      <text:p text:style-name="P7"><text:span text:style-name="T9">2016 - 2017 <text:s text:c="2"/>· <text:s text:c="2"/>Bristol</text:span></text:p>
      <text:list text:continue-numbering="true" text:style-name="WWNum1">
        <text:list-item>
          <text:p text:style-name="P8">Supported a large-scale relocation and cataloguing project.</text:p>
        </text:list-item>
        <text:list-item>
          <text:p text:style-name="P8">Managed workload across departments to meet deadlines.</text:p>
        </text:list-item>
      </text:list>
      <text:p text:style-name="P6"><text:span text:style-name="T7">Deputy Regional Commercial Manager / Senior Bookseller</text:span><text:span text:style-name="T8"> <text:s/>| <text:s/>Waterstones</text:span></text:p>
      <text:p text:style-name="P7"><text:span text:style-name="T9">2013 - 2016 <text:s text:c="2"/>· <text:s text:c="2"/>Bath</text:span></text:p>
      <text:list text:continue-numbering="true" text:style-name="WWNum1">
        <text:list-item>
          <text:p text:style-name="P8">Oversaw commercial activity across the Bath cluster.</text:p>
        </text:list-item>
        <text:list-item>
          <text:p text:style-name="P8">Managed stock, sales reporting, and customer service operations.</text:p>
        </text:list-item>
        <text:list-item>
          <text:p text:style-name="P8">Led store-level staff training and development.</text:p>
        </text:list-item>
      </text:list>
      <text:p text:style-name="P3"><text:span text:style-name="T4">PROJECT EXPERIENCE</text:span></text:p>
      <text:p text:style-name="P13"><text:span text:style-name="T7">Subscriptions Assistant - Full Stack Developer</text:span></text:p>
      <text:p text:style-name="P5"><text:span text:style-name="T9">CakePHP, MySQL, Railway.app</text:span></text:p>
      <text:list text:continue-numbering="true" text:style-name="WWNum1">
        <text:list-item>
          <text:p text:style-name="P8">Custom internal tool to assist monthly book subscription selections by querying business sales data and the Google Books API, including CSV import, tagging, and CRUD functionality.</text:p>
        </text:list-item>
        <text:list-item>
          <text:p text:style-name="P8">Demo credentials available on request. </text:p>
        </text:list-item>
      </text:list>
      <text:p text:style-name="P3"><text:span text:style-name="T4">EDUCATION</text:span></text:p>
      <text:p text:style-name="P13"><text:span text:style-name="T7">Full Stack Track - iO Academy</text:span><text:span text:style-name="T8"> <text:s/>· <text:s/>2024</text:span></text:p>
      <text:list text:continue-numbering="true" text:style-name="WWNum1">
        <text:list-item>
          <text:p text:style-name="P8">Intensive 16-week bootcamp covering full-stack development and Agile methodologies; acted as Scrum Master for teams of 8 and 3; built 7 individual and team projects; earned Agile certification.</text:p>
        </text:list-item>
      </text:list>
      <text:p text:style-name="P14"><text:span text:style-name="T7">BSc (Hons) Music and Sound Technology - University of Portsmouth</text:span><text:span text:style-name="T8"> <text:s/>· <text:s/>2013</text:span></text:p>
      <text:p text:style-name="P7"><text:span text:style-name="T8">A-Levels: Chemistry, Physics, Music Technology - King's College Taunton, 2008</text:span></text:p>
      <text:p text:style-name="P3"><text:span text:style-name="T4">AWARDS &amp; INTERESTS</text:span></text:p>
      <text:p text:style-name="P5"><text:span text:style-name="T5">Agile Certification (2024), BSAC Sports Diver (2006)</text:span></text:p>
      <text:p text:style-name="P5"><text:span text:style-name="T5">Guitar tone exploration, reading sci-fi, cycling, family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Noto Sans" style:font-size-asian="10pt" style:language-asian="zh" style:country-asian="CN" style:font-name-complex="FreeSans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Noto Sans"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Body_20_Style" style:display-name="Body Style" style:family="paragraph">
      <style:text-properties fo:font-size="10.5pt" style:font-size-asian="10.5pt" style:font-size-complex="10.5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35cm" fo:margin-bottom="1.235cm" fo:margin-left="1.411cm" fo:margin-right="1.41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7-16T11:13:13.104000000</meta:creation-date>
    <dc:date>2026-07-20T10:36:08.660881945</dc:date>
    <meta:editing-duration>PT10M10S</meta:editing-duration>
    <meta:generator>LibreOffice/26.2.4.2$Linux_X86_64 LibreOffice_project/620$Build-2</meta:generator>
    <meta:document-statistic meta:table-count="0" meta:image-count="0" meta:object-count="0" meta:page-count="2" meta:paragraph-count="50" meta:word-count="622" meta:character-count="4586" meta:non-whitespace-character-count="3991"/>
  </office:meta>
</office:document-meta>
</file>